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0FEAD7DDB44.png" manifest:media-type="image/png"/>
  <manifest:file-entry manifest:full-path="Pictures/10000000000003C1000000E200DB6CC7.png" manifest:media-type="image/png"/>
  <manifest:file-entry manifest:full-path="Pictures/10000000000004E20000010867D6DB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0589b" officeooo:paragraph-rsid="0010589b"/>
    </style:style>
    <style:style style:name="P2" style:family="paragraph" style:parent-style-name="Standard">
      <style:text-properties officeooo:paragraph-rsid="0010589b"/>
    </style:style>
    <style:style style:name="P3" style:family="paragraph" style:parent-style-name="Standard">
      <style:text-properties officeooo:rsid="00111897" officeooo:paragraph-rsid="00111897"/>
    </style:style>
    <style:style style:name="T1" style:family="text">
      <style:text-properties officeooo:rsid="0010589b"/>
    </style:style>
    <style:style style:name="T2" style:family="text">
      <style:text-properties fo:color="#dcdcaa" loext:opacity="100%" fo:font-family="'Droid Sans Mono', monospace, monospace" fo:font-size="10.5pt" fo:font-weight="normal" fo:background-color="#1f1f1f" loext:char-shading-value="0"/>
    </style:style>
    <style:style style:name="T3" style:family="text">
      <style:text-properties fo:color="#dcdcaa" loext:opacity="100%" fo:font-family="'Droid Sans Mono', monospace, monospace" fo:font-size="10.5pt" fo:font-weight="normal" officeooo:rsid="0010589b" fo:background-color="#1f1f1f" loext:char-shading-value="0"/>
    </style:style>
    <style:style style:name="T4" style:family="text">
      <style:text-properties officeooo:rsid="001118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154in" svg:y="0.0827in" svg:width="6.9252in" svg:height="1.4626in" draw:z-index="0"><draw:image xlink:href="Pictures/10000000000004E20000010867D6DB75.png" xlink:type="simple" xlink:show="embed" xlink:actuate="onLoad" draw:mime-type="image/png"/></draw:frame></text:p>
      <text:p text:style-name="P1">1) раньше проект работал только на 20 убунте, я обновил зависимости в прокте</text:p>
      <text:p text:style-name="P1">2) добавил классы логирования взаимодействия с vIED</text:p>
      <text:p text:style-name="P1">3) расширил логику MMS (чтение, запись, загрузка файлов)</text:p>
      <text:p text:style-name="P2"><text:span text:style-name="T1">4) дабавил проверки в методы </text:span><text:span text:style-name="T2">subscriber_callback_inputs_GOOSE, subscriber_callback_inputs_</text:span><text:span text:style-name="T3">SV, </text:span><text:span text:style-name="T2">subscriber_callback_inputs_</text:span><text:span text:style-name="T3">MMS</text:span><text:span text:style-name="T1"> обработку КА</text:span></text:p>
      <text:p text:style-name="P1">5) создал скрипт для автоматической прогонки КА (написан на питоне + MMS на С++)</text:p>
      <text:p text:style-name="P1">6) <text:span text:style-name="T4">доработал конифги для устройств, теперь они 110 на 10 кВ</text:span></text:p>
      <text:p text:style-name="P1"/>
      <text:p text:style-name="P2"><draw:frame draw:style-name="fr1" draw:name="Image2" text:anchor-type="char" svg:x="0in" svg:y="0.1516in" svg:width="6.9252in" svg:height="1.6283in" draw:z-index="1"><draw:image xlink:href="Pictures/10000000000003C1000000E200DB6CC7.png" xlink:type="simple" xlink:show="embed" xlink:actuate="onLoad" draw:mime-type="image/png"/></draw:frame><text:span text:style-name="T4">1) изменил системные промпты</text:span></text:p>
      <text:p text:style-name="P3">2) добавил несколько статических странчек для веба и команд в ssh</text:p>
      <text:p text:style-name="P3">3) добавил реализацию RAG через код (без отдельной векторной БД и сервиса)</text:p>
      <text:p text:style-name="P3">4) добавил логику предобработки ответа от LLM, чтобы убрать от туда лишнее</text:p>
      <text:p text:style-name="P3"/>
      <text:p text:style-name="P3"><draw:frame draw:style-name="fr2" draw:name="Image3" text:anchor-type="char" svg:width="6.9252in" svg:height="1.4654in" draw:z-index="2"><draw:image xlink:href="Pictures/10000000000004B0000000FEAD7DDB44.png" xlink:type="simple" xlink:show="embed" xlink:actuate="onLoad" draw:mime-type="image/png"/></draw:frame>1) поменял весь UI дизайн</text:p>
      <text:p text:style-name="P3">2) расширил логику взаимодействия в vIED (можно удаленно менять параметры)</text:p>
      <text:p text:style-name="P3">3) нарисовал другую мнемосхему, она интерактивная</text:p>
      <text:p text:style-name="P3">4) сделал много разных компонентов (диагностика, осцилограммы, журнал событий)</text:p>
      <text:p text:style-name="P3">5) нагенерил разных данных и файлов, чтобы не пусто было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22:03:56.049032338</meta:creation-date>
    <dc:date>2026-05-11T12:56:07.218248385</dc:date>
    <meta:editing-duration>PT8M</meta:editing-duration>
    <meta:editing-cycles>2</meta:editing-cycles>
    <meta:generator>LibreOffice/26.2.1.2$Linux_X86_64 LibreOffice_project/620$Build-2</meta:generator>
    <meta:document-statistic meta:table-count="0" meta:image-count="3" meta:object-count="0" meta:page-count="1" meta:paragraph-count="15" meta:word-count="142" meta:character-count="983" meta:non-whitespace-character-count="855"/>
  </office:meta>
</office:document-meta>
</file>